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98.964cm" style:use-optimal-column-width="false"/>
    </style:style>
    <style:style style:name="co2" style:family="table-column">
      <style:table-column-properties style:column-width="8.044cm" style:use-optimal-column-width="false"/>
    </style:style>
    <style:style style:name="co3" style:family="table-column">
      <style:table-column-properties style:column-width="180.569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0.33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24cm" fo:margin-right="1.524cm" fo:margin-top="1.524cm" fo:margin-bottom="1.524cm" fo:text-align="justify" fo:text-indent="0cm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4" style:family="paragraph">
      <style:paragraph-properties fo:margin-left="1.524cm" fo:margin-right="1.524cm" fo:margin-top="1.524cm" fo:margin-bottom="1.524cm" fo:text-align="center" fo:text-indent="0cm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Alvi Nastaleeq" fo:font-size="2pt" fo:font-weight="bold" style:font-name-asian="Calibri" style:font-size-asian="2pt" style:font-weight-asian="bold" style:font-name-complex="Alvi Nastaleeq" style:font-size-complex="2pt" style:font-weight-complex="bold"/>
    </style:style>
    <style:style style:name="T3" style:family="text">
      <style:text-properties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4" style:family="text">
      <style:text-properties fo:font-size="2pt" fo:font-weight="normal" style:font-name-asian="Liberation Sans1" style:font-size-asian="2pt" style:font-weight-asian="normal" style:font-name-complex="Liberation Sans1" style:font-size-complex="2pt" style:font-weight-complex="normal"/>
    </style:style>
    <style:style style:name="T5" style:family="text">
      <style:text-properties style:font-name="Alvi Nastaleeq" fo:font-size="200pt" style:font-name-asian="Calibri" style:font-size-asian="200pt" style:font-name-complex="Alvi Nastaleeq" style:font-size-complex="200pt"/>
    </style:style>
    <style:style style:name="T6" style:family="text">
      <style:text-properties style:font-name="Alvi Nastaleeq" fo:font-size="2pt" style:font-name-asian="Calibri" style:font-size-asian="2pt" style:font-name-complex="Alvi Nastaleeq" style:font-size-complex="2pt"/>
    </style:style>
    <style:style style:name="T7" style:family="text">
      <style:text-properties style:font-name="Alvi Nastaleeq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87.576cm" svg:height="172.55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<text:s/>آ اصغر بن تیرے میں چین کہاں سے پاوں</text:span><text:span text:style-name="T1"><text:line-break/></text:span><text:span text:style-name="T1">آلوٹ کے آجا لال میرے جی بھر کے ناز اٹھاوں</text:span><text:span text:style-name="T2"><text:line-break/></text:span><text:span text:style-name="T2"> </text:span></text:p>
              </table:table-cell>
              <table:table-cell table:style-name="ce2"/>
              <table:table-cell table:style-name="ce3">
                <text:p text:style-name="P2"><text:span text:style-name="T3">Aa Asghar bin tere, mai chayn kahan se paaun</text:span><text:span text:style-name="T3"><text:line-break/></text:span><text:span text:style-name="T3">Aa laut ke aaja laal mere, jee bhar ke naaz uth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میری آنکھ کا تارا ہے تو، مجھ کو جان سے پیارا ہے</text:span><text:span text:style-name="T5"><text:line-break/></text:span><text:span text:style-name="T5">ماں دکھیاری کے جینے کا، تو هی لال سہارا ہے</text:span><text:span text:style-name="T5"><text:line-break/></text:span><text:span text:style-name="T5">تجھے چھوڑ کے تنہا مقتل مِیں، مَیں کیسے شام کو ج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1</text:span></text:p>
              </table:table-cell>
              <table:table-cell table:style-name="ce3">
                <text:p text:style-name="P2"><text:span text:style-name="T3">Meri aankh ka taara hai tu, mujhko jaan se pyaara hai</text:span><text:span text:style-name="T3"><text:line-break/></text:span><text:span text:style-name="T3">Maa dukhyari ke jeene ka, tu hi laal sahara hai</text:span><text:span text:style-name="T3"><text:line-break/></text:span><text:span text:style-name="T3">Tujhe chhor ke tanha maqtal mein, main kaise shaam ko ja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تیری وہ معصوم ادائیں، تیری یاد دلاتی ہیں</text:span><text:span text:style-name="T5"><text:line-break/></text:span><text:span text:style-name="T5">تیرے پیار کی وہ سب باتیں، مجھ کو بہت رلاتی ہیں</text:span><text:span text:style-name="T5"><text:line-break/></text:span><text:span text:style-name="T5">میں تیری جدائی میں بیٹا، رو رو کے مر نہ ج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2</text:span></text:p>
              </table:table-cell>
              <table:table-cell table:style-name="ce3">
                <text:p text:style-name="P2"><text:span text:style-name="T3">Teri wo masoom adayein, teri yaad dilati hain</text:span><text:span text:style-name="T3"><text:line-break/></text:span><text:span text:style-name="T3">Tere pyaar ki wo sab baatein, mujhko bohot rulati hain</text:span><text:span text:style-name="T3"><text:line-break/></text:span><text:span text:style-name="T3">Main teri judayi mein beta, ro ro ke mar na ja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لوریوں والے یہ تو تیرے، ناز اٹھانے کے دن تھے</text:span><text:span text:style-name="T5"><text:line-break/></text:span><text:span text:style-name="T5">آنکھوں میں تیری خوشیوں کے، خواب سجانے کے دن تھے</text:span><text:span text:style-name="T5"><text:line-break/></text:span><text:span text:style-name="T5">آلوٹ کے اصغر آ بیٹا، (تیرا کرتا) میں بدل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3</text:span></text:p>
              </table:table-cell>
              <table:table-cell table:style-name="ce3">
                <text:p text:style-name="P2"><text:span text:style-name="T3">Loriyon wale ye to tere, naaz uthane ke din thay</text:span><text:span text:style-name="T3"><text:line-break/></text:span><text:span text:style-name="T3">Aankhon mein teri khushiyon ke, khwab sajane ke din thay</text:span><text:span text:style-name="T3"><text:line-break/></text:span><text:span text:style-name="T3">Aa laut ke Asghar aa beta, tera kurta mai badl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بھول نہیں سکتی ماں اصغر، پیاسے ہونٹ تیرے بیٹا</text:span><text:span text:style-name="T5"><text:line-break/></text:span><text:span text:style-name="T5">خالی گود ہے اور زنداں ہے، آجا ماں کے پاس آجا</text:span><text:span text:style-name="T5"><text:line-break/></text:span><text:span text:style-name="T5">آ ننھے مجاہد میں تیری، اشکوں سے پیاس بجھ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4</text:span></text:p>
              </table:table-cell>
              <table:table-cell table:style-name="ce3">
                <text:p text:style-name="P2"><text:span text:style-name="T3">Bhool nahi sakti maan Asghar, pyaase honth tere beta</text:span><text:span text:style-name="T3"><text:line-break/></text:span><text:span text:style-name="T3">Khaali god hai aur zindaan hai, aaja maan ke paas aaja</text:span><text:span text:style-name="T3"><text:line-break/></text:span><text:span text:style-name="T3">Aa nanhe mujahid mai teri, ashkon se pyaas bujh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کتنی ہے بے چین سکینہ، تیرے ناز اٹھانے کو</text:span><text:span text:style-name="T5"><text:line-break/></text:span><text:span text:style-name="T5">صبح و شام ترستی ہے وہ، تیرا دل بہلانے کو</text:span><text:span text:style-name="T5"><text:line-break/></text:span><text:span text:style-name="T5">تیری لاڈلی بہن سکینہ کا، میں دل کیسے بہل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5</text:span></text:p>
              </table:table-cell>
              <table:table-cell table:style-name="ce3">
                <text:p text:style-name="P2"><text:span text:style-name="T3">Kitni hai bechain sakina, tere naaz uthane ko</text:span><text:span text:style-name="T3"><text:line-break/></text:span><text:span text:style-name="T3">Subh-o-shaam tarasti hai woh, tera dil behlane ko</text:span><text:span text:style-name="T3"><text:line-break/></text:span><text:span text:style-name="T3">Teri laadli behen sakina ka, main dil kaise behlaun</text:span><text:span text:style-name="T4"><text:line-break/></text:span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87.579cm" fo:page-height="172.5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04:50:02.762387600</meta:creation-date>
    <dc:date>2026-07-05T20:59:39.263756681</dc:date>
    <meta:editing-duration>PT1H2M15S</meta:editing-duration>
    <meta:editing-cycles>22</meta:editing-cycles>
    <meta:generator>LibreOffice/26.2.4.2$Linux_X86_64 LibreOffice_project/620$Build-2</meta:generator>
    <meta:document-statistic meta:object-count="1"/>
  </office:meta>
</office:document-meta>
</file>