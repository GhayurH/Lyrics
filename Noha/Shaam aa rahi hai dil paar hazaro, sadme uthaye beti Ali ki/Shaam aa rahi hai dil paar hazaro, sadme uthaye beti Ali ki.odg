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01.711cm" style:use-optimal-column-width="false"/>
    </style:style>
    <style:style style:name="co2" style:family="table-column">
      <style:table-column-properties style:column-width="8.044cm" style:use-optimal-column-width="false"/>
    </style:style>
    <style:style style:name="co3" style:family="table-column">
      <style:table-column-properties style:column-width="190.019cm" style:use-optimal-column-width="false"/>
    </style:style>
    <style:style style:name="ro1" style:family="table-row">
      <style:table-row-properties style:row-height="22.32cm" style:use-optimal-row-height="false"/>
    </style:style>
    <style:style style:name="ro2" style:family="table-row">
      <style:table-row-properties style:row-height="20.889cm" style:use-optimal-row-height="false"/>
    </style:style>
    <style:style style:name="ro3" style:family="table-row">
      <style:table-row-properties style:row-height="20.877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3" style:family="table-cell">
      <loext:graphic-properties draw:textarea-horizontal-align="center"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center" fo:text-indent="0cm" fo:border="2.55pt solid #000000" style:text-autospace="none"/>
      <style:text-properties style:font-name="Liberation Sans1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4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 loext:tab-stop-distance="0cm">
        <style:tab-stops/>
      </style:paragraph-properties>
      <style:text-properties style:font-name="Alvi Nastaleeq" fo:font-size="200pt" style:font-name-asian="Calibri" style:font-size-asian="200pt" style:font-name-complex="Alvi Nastaleeq" style:font-size-complex="200pt"/>
    </style:style>
    <style:style style:name="ce5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center" fo:text-indent="0cm" fo:border="2.55pt solid #000000" style:text-autospace="none"/>
      <style:text-properties style:font-name="Alvi Nastaleeq" fo:font-size="200pt" style:font-name-asian="Liberation Sans1" style:font-size-asian="200pt" style:font-name-complex="Liberation Sans1" style:font-size-complex="200pt"/>
    </style:style>
    <style:style style:name="ce6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Liberation Sans1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1" style:family="paragraph">
      <style:paragraph-properties fo:margin-left="1.524cm" fo:margin-right="1.524cm" fo:margin-top="1.524cm" fo:margin-bottom="1.524cm" fo:text-align="center" fo:text-indent="0cm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24cm" fo:margin-right="1.524cm" fo:margin-top="1.524cm" fo:margin-bottom="1.524cm" fo:text-align="center" fo:text-indent="0cm" style:text-autospace="none"/>
      <style:text-properties style:font-name="Liberation Sans1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margin-left="1.524cm" fo:margin-right="1.524cm" fo:margin-top="1.524cm" fo:margin-bottom="1.524cm" fo:line-height="100%" fo:text-align="justify" fo:text-indent="0cm" style:text-autospace="none" loext:tab-stop-distance="0cm" style:writing-mode="rl-tb">
        <style:tab-stops/>
      </style:paragraph-properties>
    </style:style>
    <style:style style:name="P4" style:family="paragraph">
      <style:paragraph-properties fo:margin-left="1.524cm" fo:margin-right="1.524cm" fo:margin-top="1.524cm" fo:margin-bottom="1.524cm" fo:text-align="center" fo:text-indent="0cm" style:text-autospace="none"/>
      <style:text-properties style:font-name="Alvi Nastaleeq" fo:font-size="200pt" style:font-name-asian="Liberation Sans1" style:font-size-asian="200pt" style:font-name-complex="Liberation Sans1" style:font-size-complex="200pt"/>
    </style:style>
    <style:style style:name="P5" style:family="paragraph">
      <style:paragraph-properties fo:margin-left="1.524cm" fo:margin-right="1.524cm" fo:margin-top="1.524cm" fo:margin-bottom="1.524cm" fo:line-height="100%" fo:text-align="justify" fo:text-indent="0cm" style:text-autospace="none"/>
      <style:text-properties style:font-name="Liberation Sans1"/>
    </style:style>
    <style:style style:name="T1" style:family="text">
      <style:text-properties style:font-name="Alvi Nastaleeq" fo:font-weight="bold" style:font-name-asian="Calibri" style:font-weight-asian="bold" style:font-name-complex="Alvi Nastaleeq" style:font-weight-complex="bold"/>
    </style:style>
    <style:style style:name="T2" style:family="text">
      <style:text-properties fo:font-weight="normal" style:font-name-asian="Liberation Sans1" style:font-weight-asian="normal" style:font-name-complex="Liberation Sans1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lvi Nastaleeq" fo:font-size="200pt" fo:font-style="normal" fo:text-shadow="none" style:text-underline-style="none" fo:font-weight="normal" style:letter-kerning="true" style:font-name-asian="Calibri" style:font-size-asian="200pt" style:font-style-asian="normal" style:font-weight-asian="normal" style:font-name-complex="Alvi Nastaleeq" style:font-size-complex="20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font-name="Tahoma" fo:font-size="180pt" fo:font-weight="normal" style:letter-kerning="true" style:font-name-asian="Liberation Sans1" style:font-size-asian="180pt" style:font-weight-asian="normal" style:font-name-complex="Liberation Sans1" style:font-size-complex="180pt" style:font-weight-complex="normal"/>
    </style:style>
    <style:style style:name="T5" style:family="text">
      <style:text-properties style:use-window-font-color="true" loext:opacity="0%" style:font-name="Alvi Nastaleeq" fo:font-size="200pt" style:letter-kerning="true" style:font-name-asian="Calibri" style:font-size-asian="200pt" style:font-name-complex="Alvi Nastaleeq" style:font-size-complex="200pt"/>
    </style:style>
    <style:style style:name="T6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7" style:family="text">
      <style:text-properties style:font-name="Alvi Nastaleeq" fo:font-size="2pt" style:font-name-asian="Calibri" style:font-size-asian="2pt" style:font-name-complex="Alvi Nastaleeq" style:font-size-complex="2pt"/>
    </style:style>
    <style:style style:name="T8" style:family="text">
      <style:text-properties style:font-name="Alvi Nastaleeq" fo:font-size="200pt" style:font-name-asian="Liberation Sans1" style:font-size-asian="200pt" style:font-name-complex="Liberation Sans1" style:font-size-complex="20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0pt" fo:font-style="normal" fo:text-shadow="none" style:text-underline-style="none" fo:font-weight="normal" style:letter-kerning="true" style:font-name-asian="Liberation Sans1" style:font-size-asian="180pt" style:font-style-asian="normal" style:font-weight-asian="normal" style:font-name-complex="Liberation Sans1" style:font-size-complex="18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ahoma" fo:font-size="2pt" fo:font-style="normal" fo:text-shadow="none" style:text-underline-style="none" fo:font-weight="normal" style:letter-kerning="true" style:font-name-asian="Liberation Sans1" style:font-size-asian="2pt" style:font-style-asian="normal" style:font-weight-asian="normal" style:font-name-complex="Liberation Sans1" style:font-size-complex="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ahoma" fo:font-size="2pt" fo:font-weight="normal" style:font-name-asian="Liberation Sans1" style:font-size-asian="2pt" style:font-weight-asian="normal" style:font-name-complex="Liberation Sans1" style:font-size-complex="2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ahoma" fo:font-size="180pt" fo:font-style="normal" fo:text-shadow="none" style:text-underline-style="none" fo:font-weight="normal" style:letter-kerning="true" style:font-name-asian="Liberation Sans1" style:font-size-asian="180pt" style:font-style-asian="normal" style:font-weight-asian="normal" style:font-name-complex="Liberation Sans1" style:font-size-complex="18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fo:font-size="2pt" fo:font-weight="normal" style:font-name-asian="Liberation Sans1" style:font-size-asian="2pt" style:font-weight-asian="normal" style:font-name-complex="Liberation Sans1" style:font-size-complex="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99.773cm" svg:height="189.37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شام آ رہی ہے دِل پر ہزاروں، صدمے اٹھائے بیٹی علیؑ کی</text:span></text:p>
                <text:p text:style-name="P1"><text:span text:style-name="T1">ہنستے ہے سارے بازار والے، روتی ہے ہائے بیٹی علیؑ کی</text:span></text:p>
              </table:table-cell>
              <table:table-cell table:style-name="ce2"/>
              <table:table-cell table:style-name="ce3">
                <text:p text:style-name="P2"><text:span text:style-name="T2">Shaam aa rahi hai dil paar hazaro, sadme uthaye beti Ali ki</text:span></text:p>
                <text:p text:style-name="P2"><text:span text:style-name="T2">Haste hai saare baazar waale, roti hai haaye beti Ali ki</text:span></text:p>
              </table:table-cell>
            </table:table-row>
            <table:table-row table:style-name="ro2">
              <table:table-cell table:style-name="ce4">
                <text:p text:style-name="P3"><text:span text:style-name="T3">تھا جس کا بھائی عباسِؑ غازی، ہے آج قیدی وہ شاھزادی</text:span><text:span text:style-name="T4"><text:line-break/></text:span><text:span text:style-name="T5">یہ شور سُن کر غیرت كے مارے، کہیں مر نہ جائے بیٹی علیؑ کی</text:span><text:span text:style-name="T6"><text:line-break/></text:span><text:span text:style-name="T7"> </text:span></text:p>
              </table:table-cell>
              <table:table-cell table:style-name="ce5">
                <text:p text:style-name="P4"><text:span text:style-name="T8">1</text:span></text:p>
              </table:table-cell>
              <table:table-cell table:style-name="ce6">
                <text:p text:style-name="P5"><text:span text:style-name="T9">Tha jis ka bhayi Abbas-e-Ghazi, hai aaj qaidi wo shahazadi</text:span><text:span text:style-name="T9"><text:line-break/></text:span><text:span text:style-name="T9">Ye shor sun kar ghairat ke maare, kahin mar na jaaye beti Ali ki</text:span><text:span text:style-name="T10"><text:line-break/></text:span><text:span text:style-name="T10"/></text:p>
              </table:table-cell>
            </table:table-row>
            <table:table-row table:style-name="ro3">
              <table:table-cell table:style-name="ce4">
                <text:p text:style-name="P3"><text:span text:style-name="T3">چاروں طرف ہے ماحول ایسا، جیسے لگا ہو کوئی تماشہ</text:span><text:span text:style-name="T4"><text:line-break/></text:span><text:span text:style-name="T5">عباسؑ آجا چادر اڑھا جا، گھبرا نہ جائے بیٹی علیؑ کی</text:span><text:span text:style-name="T11"><text:line-break/></text:span><text:span text:style-name="T11"/></text:p>
              </table:table-cell>
              <table:table-cell table:style-name="ce5">
                <text:p text:style-name="P4"><text:span text:style-name="T8">2</text:span></text:p>
              </table:table-cell>
              <table:table-cell table:style-name="ce6">
                <text:p text:style-name="P5"><text:span text:style-name="T9">Chaaro taraf hai mahaul aisa, jaise laga ho koyi tamasha</text:span><text:span text:style-name="T9"><text:line-break/></text:span><text:span text:style-name="T9">Abbas aaja chadar urha jaa, ghabraa na jaaye beti Ali ki</text:span><text:span text:style-name="T11"><text:line-break/></text:span><text:span text:style-name="T11"/></text:p>
              </table:table-cell>
            </table:table-row>
            <table:table-row table:style-name="ro2">
              <table:table-cell table:style-name="ce4">
                <text:p text:style-name="P3"><text:span text:style-name="T3">برسا رہے ہیں پتھر ستمگر، لگتے ہیں پتھر بی بیؑ كے سر پر</text:span><text:span text:style-name="T4"><text:line-break/></text:span><text:span text:style-name="T5">بازو بندھے ہیں بے بس ہے خود کو، کیسے بچائے بیٹی علیؑ کی</text:span><text:span text:style-name="T6"><text:line-break/></text:span><text:span text:style-name="T7"> </text:span></text:p>
              </table:table-cell>
              <table:table-cell table:style-name="ce5">
                <text:p text:style-name="P4"><text:span text:style-name="T8">3</text:span></text:p>
              </table:table-cell>
              <table:table-cell table:style-name="ce6">
                <text:p text:style-name="P5"><text:span text:style-name="T9">Barsaa rahe hai pathar sitamgar, lagte hai pathar Bibi ke sar per</text:span><text:span text:style-name="T9"><text:line-break/></text:span><text:span text:style-name="T9">Bazoo bandhe hai bebas hai khud ko, kaise bachaaye beti Ali ki</text:span><text:span text:style-name="T11"><text:line-break/></text:span><text:span text:style-name="T11"/></text:p>
              </table:table-cell>
            </table:table-row>
            <table:table-row table:style-name="ro2">
              <table:table-cell table:style-name="ce4">
                <text:p text:style-name="P3"><text:span text:style-name="T3">زلفیں پکڑ کر شمرِ لعیں نے، مارے طمانچے تڑپی سكینہؑ</text:span><text:span text:style-name="T4"><text:line-break/></text:span><text:span text:style-name="T5">زینبؑ كے دونوں بازو بندھے ہیں، کیسے چھڑائے بیٹی علیؑ کی</text:span><text:span text:style-name="T6"><text:line-break/></text:span><text:span text:style-name="T7"> </text:span></text:p>
              </table:table-cell>
              <table:table-cell table:style-name="ce5">
                <text:p text:style-name="P4"><text:span text:style-name="T8">4</text:span></text:p>
              </table:table-cell>
              <table:table-cell table:style-name="ce6">
                <text:p text:style-name="P5"><text:span text:style-name="T9">Zulfe pakar kar Shimr-e layeen ne, maare tamaache tarpi Sakina</text:span><text:span text:style-name="T12"><text:line-break/></text:span><text:span text:style-name="T9">Zainab ke dono bazoo bandhe hai, kaise churaaye beti Ali ki</text:span><text:span text:style-name="T11"><text:line-break/></text:span><text:span text:style-name="T11"/></text:p>
              </table:table-cell>
            </table:table-row>
            <table:table-row table:style-name="ro3">
              <table:table-cell table:style-name="ce4">
                <text:p text:style-name="P3"><text:span text:style-name="T3">وعدہ کیا تھا اُس نے خدا سے، روشن کریگی تِرا نام چاہے</text:span><text:span text:style-name="T4"><text:line-break/></text:span><text:span text:style-name="T5">بازار جائے دربار جائے، زندان جائے بیٹی علیؑ کی</text:span><text:span text:style-name="T11"><text:line-break/></text:span><text:span text:style-name="T11"/></text:p>
              </table:table-cell>
              <table:table-cell table:style-name="ce5">
                <text:p text:style-name="P4"><text:span text:style-name="T8">5</text:span></text:p>
              </table:table-cell>
              <table:table-cell table:style-name="ce6">
                <text:p text:style-name="P5"><text:span text:style-name="T9">Wada kiya tha usne khuda se, roshan karegi tera naam chahey</text:span><text:span text:style-name="T12"><text:line-break/></text:span><text:span text:style-name="T9">Bazaar jaye darbaar jaye, zindan jaye beti ali ki</text:span><text:span text:style-name="T11"><text:line-break/></text:span><text:span text:style-name="T11"/></text:p>
              </table:table-cell>
            </table:table-row>
            <table:table-row table:style-name="ro3">
              <table:table-cell table:style-name="ce4">
                <text:p text:style-name="P3"><text:span text:style-name="T3">سجدے بچائے کعبہ بچائے، قرآن بچائے دیں کو بچائے</text:span><text:span text:style-name="T12"><text:line-break/></text:span><text:span text:style-name="T3">فرشِ عزا پہ اشکِ عزا کو، گوہر بنائے بیٹی علیؑ کی</text:span><text:span text:style-name="T10"><text:line-break/></text:span><text:span text:style-name="T10"/></text:p>
              </table:table-cell>
              <table:table-cell table:style-name="ce5">
                <text:p text:style-name="P4">6</text:p>
              </table:table-cell>
              <table:table-cell table:style-name="ce6">
                <text:p text:style-name="P5"><text:span text:style-name="T9">Sajdey bachaye kaaba bachaye, quran bachaye deen ko bachaye</text:span><text:span text:style-name="T12"><text:line-break/></text:span><text:span text:style-name="T9">Farsh e aza par ashk e aza ko, Gohar banaye beti Ali ki</text:span><text:span text:style-name="T13"><text:line-break/></text:span><text:span text:style-name="T13"/></text:p>
              </table:table-cell>
            </table:table-row>
            <table:table-row table:style-name="ro3">
              <table:table-cell table:style-name="ce4">
                <text:p text:style-name="P3"><text:span text:style-name="T3">جانا ہے اُسکو دربار شامی، چاروں طرف ہے مجمع شرابی</text:span><text:span text:style-name="T12"><text:line-break/></text:span><text:span text:style-name="T3">زینبؑ كے سر پر چادر نہیں ہے، کس طرح جائے بیٹی علیؑ کی</text:span><text:span text:style-name="T10"><text:line-break/></text:span><text:span text:style-name="T10"/></text:p>
              </table:table-cell>
              <table:table-cell table:style-name="ce5">
                <text:p text:style-name="P4">7</text:p>
              </table:table-cell>
              <table:table-cell table:style-name="ce6">
                <text:p text:style-name="P5"><text:span text:style-name="T9">Jana hai usko darbar shami, chaaro taraf hai majma sharabi</text:span><text:span text:style-name="T12"><text:line-break/></text:span><text:span text:style-name="T9">Zainab ke sar par chadar nahi hai, kis tarha jaye beti ali ki</text:span><text:span text:style-name="T13"><text:line-break/></text:span><text:span text:style-name="T13"/></text:p>
              </table:table-cell>
            </table:table-row>
            <table:table-row table:style-name="ro3">
              <table:table-cell table:style-name="ce4">
                <text:p text:style-name="P3"><text:span text:style-name="T3">جو كہ پلی تھیں ٹکڑوں پہ اُن کے، آزاد ہیں وہ ادنیٰ کنیزیں</text:span><text:span text:style-name="T12"><text:line-break/></text:span><text:span text:style-name="T3">کیسی قیامت آئی ہے یا رب، قیدی ہے ہائے بیٹی علیؑ کی</text:span><text:span text:style-name="T10"><text:line-break/></text:span><text:span text:style-name="T10"/></text:p>
              </table:table-cell>
              <table:table-cell table:style-name="ce5">
                <text:p text:style-name="P4">8</text:p>
              </table:table-cell>
              <table:table-cell table:style-name="ce6">
                <text:p text:style-name="P5"><text:span text:style-name="T9">Jo ke pali thi tukro pe unke, azaad hai wo adnaa kanizein</text:span><text:span text:style-name="T12"><text:line-break/></text:span><text:span text:style-name="T9">Kaisi qayamat aayi hai Ya Rab, qaidi hai haaye beti ali ki</text:span><text:span text:style-name="T13"><text:line-break/></text:span><text:span text:style-name="T13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99.771cm" fo:page-height="189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3T04:50:02.762387600</meta:creation-date>
    <dc:date>2026-07-05T20:58:08.669240349</dc:date>
    <meta:editing-duration>PT1H14M15S</meta:editing-duration>
    <meta:editing-cycles>23</meta:editing-cycles>
    <meta:generator>LibreOffice/26.2.4.2$Linux_X86_64 LibreOffice_project/620$Build-2</meta:generator>
    <meta:document-statistic meta:object-count="1"/>
  </office:meta>
</office:document-meta>
</file>