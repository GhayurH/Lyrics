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853cm" style:use-optimal-column-width="false"/>
    </style:style>
    <style:style style:name="co2" style:family="table-column">
      <style:table-column-properties style:column-width="75.368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2.22cm" svg:height="125.3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مجرئی خلق میں ان آنکھوں نے کیا کیا دیکھا</text:span><text:span text:style-name="T1"><text:line-break/></text:span><text:span text:style-name="T1">پر کہیں سبطِ پیمبر سا نہ آقا دیکھا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<text:span text:style-name="T1">کہتی تھیں زینبِ مضطر کہ خدا خیر کرے</text:span><text:span text:style-name="T1"><text:line-break/></text:span><text:span text:style-name="T1">رات کو خواب میں اُریاں سرِ زہرا دیکھا</text:span><text:span text:style-name="T2"><text:line-break/></text:span><text:span text:style-name="T2"/></text:p>
              </table:table-cell>
              <table:table-cell>
                <text:p text:style-name="P1"><text:span text:style-name="T1">میں نے دیکھا علمِ شاہ کو آلودئہ خون</text:span><text:span text:style-name="T1"><text:line-break/></text:span><text:span text:style-name="T1">میں نے نیزے پہ سرِ دلبرِ زہرا دیکھ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میں نے دیکھا علی اصغر کا گلا خون میں تر</text:span><text:span text:style-name="T1"><text:line-break/></text:span><text:span text:style-name="T1">میں نے عباس کو ریتی پہ تڑپتا دیکھا</text:span><text:span text:style-name="T2"><text:line-break/></text:span><text:span text:style-name="T2"/></text:p>
              </table:table-cell>
              <table:table-cell>
                <text:p text:style-name="P1"><text:span text:style-name="T1">ایک گٹھری شہِ دین پشت پہ لائے اُسمیں</text:span><text:span text:style-name="T1"><text:line-break/></text:span><text:span text:style-name="T1">میں نے ٹکڑے ہوئے قاسم کا سراپا دیکھ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گر پڑے سبطِ نبی تھام کے ہاتھوں سے جگر</text:span><text:span text:style-name="T1"><text:line-break/></text:span><text:span text:style-name="T1">علی اکبر کو جو ریتی پہ تڑپتا دیکھا</text:span><text:span text:style-name="T2"><text:line-break/></text:span><text:span text:style-name="T2"/></text:p>
              </table:table-cell>
              <table:table-cell>
                <text:p text:style-name="P1"><text:span text:style-name="T1">بےردا خلق نے اس بی بی کے سر کو دیکھا</text:span><text:span text:style-name="T1"><text:line-break/></text:span><text:span text:style-name="T1">جس کی مادر کا کسی نے نہ جنازہ دیکھ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ہائے کیوں ہو نہ گئیں کوڑا کہ ان آنکھوں نے</text:span><text:span text:style-name="T1"><text:line-break/></text:span><text:span text:style-name="T1">قید خانے میں سکینہ کا جنازہ دیکھا</text:span><text:span text:style-name="T2"><text:line-break/></text:span><text:span text:style-name="T2"/></text:p>
              </table:table-cell>
              <table:table-cell>
                <text:p text:style-name="P1"><text:span text:style-name="T1">جا کے زینب نے مدینے میں کہا صغریٰ سے</text:span><text:span text:style-name="T1"><text:line-break/></text:span><text:span text:style-name="T1">کہوں کس منہ سے کہ پردیس میں کیا کیا دیکھ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 table:number-columns-spanned="2">
                <text:p text:style-name="P1"><text:span text:style-name="T1">ظلم ہے مجرئی سجاد نے کیا کیا دیکھا</text:span><text:span text:style-name="T1"><text:line-break/></text:span><text:span text:style-name="T1">گھر لٹا قید ہوئے باپ کا لاشہ دیکھا</text:span><text:span text:style-name="T2"><text:line-break/></text:span><text:span text:style-name="T2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2.222cm" fo:page-height="125.3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17:00.760104600</meta:creation-date>
    <dc:date>2026-01-30T08:27:08.516379600</dc:date>
    <meta:editing-duration>PT6M2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