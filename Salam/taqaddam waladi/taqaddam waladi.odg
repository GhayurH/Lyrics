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1.587cm" style:use-optimal-column-width="false"/>
    </style:style>
    <style:style style:name="co2" style:family="table-column">
      <style:table-column-properties style:column-width="76.388cm" style:use-optimal-column-width="false"/>
    </style:style>
    <style:style style:name="ro1" style:family="table-row">
      <style:table-row-properties style:row-height="68.114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524cm" fo:margin-right="1.524cm" fo:margin-top="1.524cm" fo:margin-bottom="1.524cm" fo:text-align="justify" fo:text-indent="0cm" style:text-autospace="none" style:writing-mode="rl-tb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3" style:family="text">
      <style:text-properties style:font-name="Alvi Nastaleeq" fo:font-size="2pt" style:font-name-asian="Liberation Sans1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7.974cm" svg:height="408.68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کربلا ہو چکی تیار، تقدم ولدی<text:line-break/>بڑهے آتے ہیں جفاکار، تقدم ولدی<text:line-break/>چاروں جانب سے ہے یلغار، تقدم ولدی<text:line-break/>ہوتی ہے تیروں کی بوچهاڑ، تقدم ولدی<text:line-break/><text:line-break/>زد پہ ہیں سب میرے انصار، تقدم ولدی<text:line-break/>کربلا ہو چکی تیار، تقدم ولدی<text:span text:style-name="T1"><text:line-break/></text:span><text:span text:style-name="T1"/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2">اے میرے لختِ جگر، اے میرے پیارے فرزند</text:span><text:span text:style-name="T2"><text:line-break/></text:span><text:span text:style-name="T2">ہیں یہ نو لاکھ تو کیا، عزم تو ہے اپنا بلند</text:span><text:span text:style-name="T2"><text:line-break/></text:span><text:span text:style-name="T2">آگے آگے صفِ اول کے رہے اپنا سمند</text:span><text:span text:style-name="T2"><text:line-break/></text:span><text:span text:style-name="T2">میرے اصحاب کو پہنچے نہ کہیں کوئی گزند</text:span><text:span text:style-name="T2"><text:line-break/></text:span><text:span text:style-name="T2"> </text:span><text:span text:style-name="T2"><text:line-break/></text:span><text:span text:style-name="T2">تیر آتے ہیں لگاتار، تقدم ولدی</text:span><text:span text:style-name="T2"><text:line-break/></text:span><text:span text:style-name="T2">کربلا ہو چکی تیار، تقدم ولدی</text:span><text:span text:style-name="T3"><text:line-break/></text:span><text:span text:style-name="T3"/></text:p>
              </table:table-cell>
              <table:table-cell>
                <text:p text:style-name="P1">وقت یہ وه ہے کہ تلوار اٹهالیں ہم لوگ<text:line-break/>دینِ حق کو کسی صورت سے بچالیں ہم لوگ<text:line-break/>کیوں کسی اور پہ اس بار کو ڈالیں ہم لوگ<text:line-break/>کیوں نہ یہ معرکہ خود آپ سنبهالیں ہم لوگ<text:line-break/><text:line-break/>کھینچ کر نیام سے تلوار، تقدم ولدی<text:line-break/>کربلا ہو چکی تیار، تقدم ولدی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2"><text:span text:style-name="T2">دین نانا کا مٹے اور نواسہ سہ لے</text:span><text:span text:style-name="T2"><text:line-break/></text:span><text:span text:style-name="T2">یہ نہ ہوگا کبھی ہم سے کوئی کچھ بھی کہہ لے</text:span><text:span text:style-name="T2"><text:line-break/></text:span><text:span text:style-name="T2">خون بہتا ہے تو ہم لوگوں کا اس پر بہہ لے</text:span><text:span text:style-name="T2"><text:line-break/></text:span><text:span text:style-name="T2">بھیجتا جنگ پہ عابدؑ کو میں تم سے پہلے</text:span><text:span text:style-name="T2"><text:line-break/></text:span><text:span text:style-name="T2"> </text:span><text:span text:style-name="T2"><text:line-break/></text:span><text:span text:style-name="T2">مگر عابدؑ تو ہیں بیمار، تقدم ولدی</text:span><text:span text:style-name="T2"><text:line-break/></text:span><text:span text:style-name="T2">کربلا ہو چکی تیار، تقدم ولدی</text:span><text:span text:style-name="T3"><text:line-break/></text:span><text:span text:style-name="T3"/></text:p>
              </table:table-cell>
              <table:table-cell>
                <text:p text:style-name="P1">بھائی عباسؑ سنبھالے رہیں لشکر کا نظام<text:line-break/>قاسم و عون و محمد رہیں نزدیکِ خیام<text:line-break/>تاکہ اس سمت کا رخ کر نہ سکے لشکرِ شام<text:line-break/>اور تم بہرِ وغا آگے بڑھو لے کے حسام<text:line-break/><text:line-break/>تیرا اللہ مددگار، تقدم ولدی<text:line-break/>کربلا ہو چکی تیار، تقدم ولدی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2"><text:span text:style-name="T2">ہم کو تاریخ بدل دینی ہے دشت و در کی</text:span><text:span text:style-name="T2"><text:line-break/></text:span><text:span text:style-name="T2">پڑے آئندہ نظر جس پہ زمانے بھر کی</text:span><text:span text:style-name="T2"><text:line-break/></text:span><text:span text:style-name="T2">گر ضرورت ہو تو بازی بھی لگا دو سر کی</text:span><text:span text:style-name="T2"><text:line-break/></text:span><text:span text:style-name="T2">آخری جنگ سمجھ لو اِسے اپنے گھر کی</text:span><text:span text:style-name="T2"><text:line-break/></text:span><text:span text:style-name="T2"> </text:span><text:span text:style-name="T2"><text:line-break/></text:span><text:span text:style-name="T2">جانے پھر کب کھنچے تلوار، تقدم ولدی</text:span><text:span text:style-name="T2"><text:line-break/></text:span><text:span text:style-name="T2">کربلا ہو چکی تیار، تقدم ولدی</text:span><text:span text:style-name="T3"><text:line-break/></text:span><text:span text:style-name="T3"/></text:p>
              </table:table-cell>
              <table:table-cell>
                <text:p text:style-name="P1">مجھ سے یہ چاہتے ہیں بدر و احد کا بدلہ<text:line-break/>میرے اسلاف کی ہر جد و جہد کا بدلہ<text:line-break/>دینِ اسلام کی نصرت کا مدد کا بدلہ<text:line-break/>باپ سے تیرے یہ لیں گے تیرے جد کا بدلہ<text:line-break/><text:line-break/>ہم ہیں اِس کے لئے تیار، تقدم ولدی<text:line-break/>کربلا ہو چکی تیار، تقدم ولدی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2"><text:span text:style-name="T2">کہیں ایسا نہ ہو زینبؑ کو خبر ہو جائے</text:span><text:span text:style-name="T2"><text:line-break/></text:span><text:span text:style-name="T2">اور طلب عون و محمد کی اُدھر ہو جائے</text:span><text:span text:style-name="T2"><text:line-break/></text:span><text:span text:style-name="T2">تاروں کو اذنِ سفر قبلِ قمر ہو جائے</text:span><text:span text:style-name="T2"><text:line-break/></text:span><text:span text:style-name="T2">میری ترتیب ہی سب زیر و زبر ہو جائے</text:span><text:span text:style-name="T2"><text:line-break/></text:span><text:span text:style-name="T2"> </text:span><text:span text:style-name="T2"><text:line-break/></text:span><text:span text:style-name="T2">ہوسکے ہم سے نہ انکار، تقدم ولدی</text:span><text:span text:style-name="T2"><text:line-break/></text:span><text:span text:style-name="T2">کربلا ہو چکی تیار، تقدم ولدی</text:span><text:span text:style-name="T3"><text:line-break/></text:span><text:span text:style-name="T3"/></text:p>
              </table:table-cell>
              <table:table-cell>
                <text:p text:style-name="P1">کہیں ایسا نہ ہو عباسِ علی ؑ بطلِ جلیل<text:line-break/>اس طرح دیکھ کے بربادئ گلزارِ خلیلؑ<text:line-break/>تم سے پہلے ہی وہ کر جائیں وَغا میں تعجیل<text:line-break/>کر کے قاسمؑ کے حوالے علمِ فوجِ قلیل<text:line-break/><text:line-break/>خود بڑھیں تول کے تلوار، تقدم ولدی<text:line-break/>کربلا ہو چکی تیار، تقدم ولدی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 table:number-columns-spanned="2">
                <text:p text:style-name="P1">امّ لیلی درِ خیمہ سے کہیں دیکھ نہ لے<text:line-break/>رُخ تمہارا ہے سوئے فوجِ لعیں دیکھ نہ لے<text:line-break/>ابر میں جاتے ہوئے ماہِ مبیں دیکھ نہ لے<text:line-break/>شیر کو نیزوں کے جنگل کے قریں دیکھ نہ لے<text:line-break/><text:line-break/>پھر تو جانا بھی ہے دشوار، تقدم ولدی<text:line-break/>کربلا ہو چکی تیار، تقدم ولدی<text:span text:style-name="T1"><text:line-break/></text:span><text:span text:style-name="T1"/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57.963cm" fo:page-height="408.6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11:20:25.738621500</meta:creation-date>
    <dc:date>2026-01-29T11:34:54.044219900</dc:date>
    <meta:editing-duration>PT14M28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