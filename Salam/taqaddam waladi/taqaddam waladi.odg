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lvi Nastaleeq" svg:font-family="'Alvi Nastaleeq'" style:font-pitch="variable"/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co1" style:family="table-column">
      <style:table-column-properties style:column-width="81.587cm" style:use-optimal-column-width="false"/>
    </style:style>
    <style:style style:name="co2" style:family="table-column">
      <style:table-column-properties style:column-width="76.388cm" style:use-optimal-column-width="false"/>
    </style:style>
    <style:style style:name="ro1" style:family="table-row">
      <style:table-row-properties style:row-height="68.114cm" style:use-optimal-row-height="false"/>
    </style:style>
    <style:style style:name="ce1" style:family="table-cell">
      <loext:graphic-properties draw:textarea-vertical-align="middle" fo:padding-top="1.27cm" fo:padding-bottom="0.635cm" fo:padding-left="0.635cm" fo:padding-right="0.635cm" style:writing-mode="rl-tb"/>
      <style:paragraph-properties fo:margin-left="1.524cm" fo:margin-right="1.524cm" fo:margin-top="1.524cm" fo:margin-bottom="1.524cm" fo:text-align="justify" fo:text-indent="0cm" fo:border="2.55pt solid #000000" style:text-autospace="none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P1" style:family="paragraph">
      <style:paragraph-properties fo:margin-left="1.524cm" fo:margin-right="1.524cm" fo:margin-top="1.524cm" fo:margin-bottom="1.524cm" fo:text-align="justify" fo:text-indent="0cm" style:text-autospace="none" style:writing-mode="rl-tb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T1" style:family="text">
      <style:text-properties style:font-name="Alvi Nastaleeq" fo:font-size="200pt" style:font-name-asian="Liberation Sans1" style:font-size-asian="200pt" style:font-name-complex="Alvi Nastaleeq" style:font-size-complex="200pt"/>
    </style:style>
    <style:style style:name="T2" style:family="text">
      <style:text-properties style:font-name="Alvi Nastaleeq" fo:font-size="2pt" style:font-name-asian="Liberation Sans1" style:font-size-asian="2pt" style:font-name-complex="Alvi Nastaleeq" style:font-size-complex="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157.974cm" svg:height="408.683cm" svg:x="0cm" svg:y="0cm">
          <table:table table:template-name="black-gray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 table:number-columns-spanned="2">
                <text:p text:style-name="P1"><text:span text:style-name="T1">کربلا ہو چکی تیار، تقدم ولدی</text:span><text:span text:style-name="T1"><text:line-break/></text:span><text:span text:style-name="T1">بڑھے آتے ہیں جفاکار، تقدم ولدی</text:span><text:span text:style-name="T1"><text:line-break/></text:span><text:span text:style-name="T1">چاروں جانب سے ہے یلغار، تقدم ولدی</text:span><text:span text:style-name="T1"><text:line-break/></text:span><text:span text:style-name="T1">ہوتی ہے تیروں کی بوچهاڑ، تقدم ولدی</text:span><text:span text:style-name="T1"><text:line-break/></text:span><text:span text:style-name="T1"><text:line-break/></text:span><text:span text:style-name="T1">زد پہ ہیں سب میرے انصار، تقدم ولدی</text:span><text:span text:style-name="T1"><text:line-break/></text:span><text:span text:style-name="T1">کربلا ہو چکی تیار، تقدم ولدی</text:span><text:span text:style-name="T2"><text:line-break/></text:span><text:span text:style-name="T2"/></text:p>
              </table:table-cell>
              <table:covered-table-cell/>
            </table:table-row>
            <table:table-row table:style-name="ro1" table:default-cell-style-name="ce1">
              <table:table-cell>
                <text:p text:style-name="P1"><text:span text:style-name="T1">اے میرے لختِ جگر، اے میرے پیارے فرزند</text:span><text:span text:style-name="T1"><text:line-break/></text:span><text:span text:style-name="T1">ہیں یہ نو لاکھ تو کیا، عزم تو ہے اپنا بلند</text:span><text:span text:style-name="T1"><text:line-break/></text:span><text:span text:style-name="T1">آگے آگے صفِ اول کے رہے اپنا سمند</text:span><text:span text:style-name="T1"><text:line-break/></text:span><text:span text:style-name="T1">میرے اصحاب کو پہنچے نہ کہیں کوئی گزند</text:span><text:span text:style-name="T1"><text:line-break/></text:span><text:span text:style-name="T1"> </text:span><text:span text:style-name="T1"><text:line-break/></text:span><text:span text:style-name="T1">تیر آتے ہیں لگاتار، تقدم ولدی</text:span><text:span text:style-name="T1"><text:line-break/></text:span><text:span text:style-name="T1">کربلا ہو چکی تیار، تقدم ولدی</text:span><text:span text:style-name="T2"><text:line-break/></text:span><text:span text:style-name="T2"/></text:p>
              </table:table-cell>
              <table:table-cell>
                <text:p text:style-name="P1"><text:span text:style-name="T1">وقت یہ وه ہے کہ تلوار اٹھالیں ہم لوگ</text:span><text:span text:style-name="T1"><text:line-break/></text:span><text:span text:style-name="T1">دینِ حق کو کسی صورت سے بچالیں ہم لوگ</text:span><text:span text:style-name="T1"><text:line-break/></text:span><text:span text:style-name="T1">کیوں کسی اور پہ اس بار کو ڈالیں ہم لوگ</text:span><text:span text:style-name="T1"><text:line-break/></text:span><text:span text:style-name="T1">کیوں نہ یہ معرکہ خود آپ سنبھالیں ہم لوگ</text:span><text:span text:style-name="T1"><text:line-break/></text:span><text:span text:style-name="T1"><text:line-break/></text:span><text:span text:style-name="T1">کھینچ کر نیام سے تلوار، تقدم ولدی</text:span><text:span text:style-name="T1"><text:line-break/></text:span><text:span text:style-name="T1">کربلا ہو چکی تیار، تقدم ولدی</text:span><text:span text:style-name="T2"><text:line-break/></text:span><text:span text:style-name="T2"/></text:p>
              </table:table-cell>
            </table:table-row>
            <table:table-row table:style-name="ro1" table:default-cell-style-name="ce1">
              <table:table-cell>
                <text:p text:style-name="P1"><text:span text:style-name="T1">دین نانا کا مٹے اور نواسہ سہ لے</text:span><text:span text:style-name="T1"><text:line-break/></text:span><text:span text:style-name="T1">یہ نہ ہوگا کبھی ہم سے کوئی کچھ بھی کہہ لے</text:span><text:span text:style-name="T1"><text:line-break/></text:span><text:span text:style-name="T1">خون بہتا ہے تو ہم لوگوں کا اس پر بہہ لے</text:span><text:span text:style-name="T1"><text:line-break/></text:span><text:span text:style-name="T1">بھیجتا جنگ پہ عابدؑ کو میں تم سے پہلے</text:span><text:span text:style-name="T1"><text:line-break/></text:span><text:span text:style-name="T1"> </text:span><text:span text:style-name="T1"><text:line-break/></text:span><text:span text:style-name="T1">مگر عابدؑ تو ہیں بیمار، تقدم ولدی</text:span><text:span text:style-name="T1"><text:line-break/></text:span><text:span text:style-name="T1">کربلا ہو چکی تیار، تقدم ولدی</text:span><text:span text:style-name="T2"><text:line-break/></text:span><text:span text:style-name="T2"/></text:p>
              </table:table-cell>
              <table:table-cell>
                <text:p text:style-name="P1"><text:span text:style-name="T1">بھائی عباسؑ سنبھالے رہیں لشکر کا نظام</text:span><text:span text:style-name="T1"><text:line-break/></text:span><text:span text:style-name="T1">قاسم و عون و محمد رہیں نزدیکِ خیام</text:span><text:span text:style-name="T1"><text:line-break/></text:span><text:span text:style-name="T1">تاکہ اس سمت کا رخ کر نہ سکے لشکرِ شام</text:span><text:span text:style-name="T1"><text:line-break/></text:span><text:span text:style-name="T1">اور تم بہرِ وغا آگے بڑھو لے کے حسام</text:span><text:span text:style-name="T1"><text:line-break/></text:span><text:span text:style-name="T1"><text:line-break/></text:span><text:span text:style-name="T1">تیرا اللہ مددگار، تقدم ولدی</text:span><text:span text:style-name="T1"><text:line-break/></text:span><text:span text:style-name="T1">کربلا ہو چکی تیار، تقدم ولدی</text:span><text:span text:style-name="T2"><text:line-break/></text:span><text:span text:style-name="T2"/></text:p>
              </table:table-cell>
            </table:table-row>
            <table:table-row table:style-name="ro1" table:default-cell-style-name="ce1">
              <table:table-cell>
                <text:p text:style-name="P1"><text:span text:style-name="T1">ہم کو تاریخ بدل دینی ہے دشت و در کی</text:span><text:span text:style-name="T1"><text:line-break/></text:span><text:span text:style-name="T1">پڑے آئندہ نظر جس پہ زمانے بھر کی</text:span><text:span text:style-name="T1"><text:line-break/></text:span><text:span text:style-name="T1">گر ضرورت ہو تو بازی بھی لگا دو سر کی</text:span><text:span text:style-name="T1"><text:line-break/></text:span><text:span text:style-name="T1">آخری جنگ سمجھ لو اِسے اپنے گھر کی</text:span><text:span text:style-name="T1"><text:line-break/></text:span><text:span text:style-name="T1"> </text:span><text:span text:style-name="T1"><text:line-break/></text:span><text:span text:style-name="T1">جانے پھر کب کھنچے تلوار، تقدم ولدی</text:span><text:span text:style-name="T1"><text:line-break/></text:span><text:span text:style-name="T1">کربلا ہو چکی تیار، تقدم ولدی</text:span><text:span text:style-name="T2"><text:line-break/></text:span><text:span text:style-name="T2"/></text:p>
              </table:table-cell>
              <table:table-cell>
                <text:p text:style-name="P1"><text:span text:style-name="T1">مجھ سے یہ چاہتے ہیں بدر و احد کا بدلہ</text:span><text:span text:style-name="T1"><text:line-break/></text:span><text:span text:style-name="T1">میرے اسلاف کی ہر جد و جہد کا بدلہ</text:span><text:span text:style-name="T1"><text:line-break/></text:span><text:span text:style-name="T1">دینِ اسلام کی نصرت کا مدد کا بدلہ</text:span><text:span text:style-name="T1"><text:line-break/></text:span><text:span text:style-name="T1">باپ سے تیرے یہ لیں گے تیرے جد کا بدلہ</text:span><text:span text:style-name="T1"><text:line-break/></text:span><text:span text:style-name="T1"><text:line-break/></text:span><text:span text:style-name="T1">ہم ہیں اِس کے لئے تیار، تقدم ولدی</text:span><text:span text:style-name="T1"><text:line-break/></text:span><text:span text:style-name="T1">کربلا ہو چکی تیار، تقدم ولدی</text:span><text:span text:style-name="T2"><text:line-break/></text:span><text:span text:style-name="T2"/></text:p>
              </table:table-cell>
            </table:table-row>
            <table:table-row table:style-name="ro1" table:default-cell-style-name="ce1">
              <table:table-cell>
                <text:p text:style-name="P1"><text:span text:style-name="T1">کہیں ایسا نہ ہو زینبؑ کو خبر ہو جائے</text:span><text:span text:style-name="T1"><text:line-break/></text:span><text:span text:style-name="T1">اور طلب عون و محمد کی اُدھر ہو جائے</text:span><text:span text:style-name="T1"><text:line-break/></text:span><text:span text:style-name="T1">تاروں کو اذنِ سفر قبلِ قمر ہو جائے</text:span><text:span text:style-name="T1"><text:line-break/></text:span><text:span text:style-name="T1">میری ترتیب ہی سب زیر و زبر ہو جائے</text:span><text:span text:style-name="T1"><text:line-break/></text:span><text:span text:style-name="T1"> </text:span><text:span text:style-name="T1"><text:line-break/></text:span><text:span text:style-name="T1">ہوسکے ہم سے نہ انکار، تقدم ولدی</text:span><text:span text:style-name="T1"><text:line-break/></text:span><text:span text:style-name="T1">کربلا ہو چکی تیار، تقدم ولدی</text:span><text:span text:style-name="T2"><text:line-break/></text:span><text:span text:style-name="T2"/></text:p>
              </table:table-cell>
              <table:table-cell>
                <text:p text:style-name="P1"><text:span text:style-name="T1">کہیں ایسا نہ ہو عباسِ علی ؑ بطلِ جلیل</text:span><text:span text:style-name="T1"><text:line-break/></text:span><text:span text:style-name="T1">اس طرح دیکھ کے بربادئ گلزارِ خلیلؑ</text:span><text:span text:style-name="T1"><text:line-break/></text:span><text:span text:style-name="T1">تم سے پہلے ہی وہ کر جائیں وَغا میں تعجیل</text:span><text:span text:style-name="T1"><text:line-break/></text:span><text:span text:style-name="T1">کر کے قاسمؑ کے حوالے علمِ فوجِ قلیل</text:span><text:span text:style-name="T1"><text:line-break/></text:span><text:span text:style-name="T1"><text:line-break/></text:span><text:span text:style-name="T1">خود بڑھیں تول کے تلوار، تقدم ولدی</text:span><text:span text:style-name="T1"><text:line-break/></text:span><text:span text:style-name="T1">کربلا ہو چکی تیار، تقدم ولدی</text:span><text:span text:style-name="T2"><text:line-break/></text:span><text:span text:style-name="T2"/></text:p>
              </table:table-cell>
            </table:table-row>
            <table:table-row table:style-name="ro1" table:default-cell-style-name="ce1">
              <table:table-cell table:number-columns-spanned="2">
                <text:p text:style-name="P1"><text:span text:style-name="T1">امّ لیلی درِ خیمہ سے کہیں دیکھ نہ لے</text:span><text:span text:style-name="T1"><text:line-break/></text:span><text:span text:style-name="T1">رُخ تمہارا ہے سوئے فوجِ لعیں دیکھ نہ لے</text:span><text:span text:style-name="T1"><text:line-break/></text:span><text:span text:style-name="T1">ابر میں جاتے ہوئے ماہِ مبیں دیکھ نہ لے</text:span><text:span text:style-name="T1"><text:line-break/></text:span><text:span text:style-name="T1">شیر کو نیزوں کے جنگل کے قریں دیکھ نہ لے</text:span><text:span text:style-name="T1"><text:line-break/></text:span><text:span text:style-name="T1"><text:line-break/></text:span><text:span text:style-name="T1">پھر تو جانا بھی ہے دشوار، تقدم ولدی</text:span><text:span text:style-name="T1"><text:line-break/></text:span><text:span text:style-name="T1">کربلا ہو چکی تیار، تقدم ولدی</text:span><text:span text:style-name="T2"><text:line-break/></text:span><text:span text:style-name="T2"/></text:p>
              </table:table-cell>
              <table:covered-table-cell/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lvi Nastaleeq" svg:font-family="'Alvi Nastaleeq'" style:font-pitch="variable"/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ck-with-border" style:family="table-cell" style:parent-style-name="default">
      <loext:graphic-properties draw:fill="solid" draw:fill-color="#000000"/>
      <style:paragraph-properties fo:border="0.28pt solid #666666"/>
      <style:text-properties fo:color="#ffffff" loext:opacity="100%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-with-border" style:family="table-cell" style:parent-style-name="default">
      <loext:graphic-properties draw:fill="solid" draw:fill-color="#cccccc"/>
      <style:paragraph-properties fo:border="0.28pt solid #666666"/>
    </style:style>
    <style:style style:name="white-with-border" style:family="table-cell" style:parent-style-name="default">
      <loext:graphic-properties draw:fill="solid" draw:fill-color="#ffffff"/>
      <style:paragraph-properties fo:border="0.28pt solid #666666"/>
    </style:style>
    <table:table-template table:name="black-gray">
      <table:first-row table:style-name="black-with-border"/>
      <table:last-row table:style-name="black-with-border"/>
      <table:first-column table:style-name="black-with-border"/>
      <table:last-column table:style-name="black-with-border"/>
      <table:body table:style-name="white-with-border"/>
      <table:odd-rows table:style-name="gray-with-border"/>
      <table:odd-columns table:style-name="gray-with-border"/>
    </table:table-template>
  </office:styles>
  <office:automatic-styles>
    <style:page-layout style:name="PM0">
      <style:page-layout-properties fo:margin-top="0cm" fo:margin-bottom="0cm" fo:margin-left="0cm" fo:margin-right="0cm" fo:page-width="157.963cm" fo:page-height="408.68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1-29T11:20:25.738621500</meta:creation-date>
    <dc:date>2026-01-30T08:11:23.368154500</dc:date>
    <meta:editing-duration>PT14M30S</meta:editing-duration>
    <meta:editing-cycles>3</meta:editing-cycles>
    <meta:generator>LibreOffice/25.8.4.2$Windows_X86_64 LibreOffice_project/290daaa01b999472f0c7a3890eb6a550fd74c6df</meta:generator>
    <meta:document-statistic meta:object-count="1"/>
  </office:meta>
</office:document-meta>
</file>