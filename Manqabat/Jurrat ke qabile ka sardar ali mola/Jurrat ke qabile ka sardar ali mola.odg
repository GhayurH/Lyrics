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899cm" style:use-optimal-column-width="false"/>
    </style:style>
    <style:style style:name="ro1" style:family="table-row">
      <style:table-row-properties style:row-height="30.334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style:style style:name="T3" style:family="text">
      <style:text-properties style:font-name="Alvi Nastaleeq" fo:font-size="200pt" style:font-size-asian="200pt" style:font-name-complex="Alvi Nastaleeq" style:font-size-complex="200pt"/>
    </style:style>
    <style:style style:name="T4" style:family="text">
      <style:text-properties style:font-name="Alvi Nastaleeq" fo:font-size="2pt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6.898cm" svg:height="109.891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جرات کے قبیلے کا سردار علی مولا</text:span><text:span text:style-name="T1"><text:line-break/></text:span><text:span text:style-name="T1">کرار علی مولا جرار علی مولا</text:span><text:span text:style-name="T1"><text:line-break/></text:span><text:span text:style-name="T1">سرداروں کے لشکر کا سردار علی مولا</text:span><text:span text:style-name="T2"><text:line-break/></text:span><text:span text:style-name="T2"/></text:p>
              </table:table-cell>
            </table:table-row>
            <table:table-row table:style-name="ro2">
              <table:table-cell table:style-name="ce2">
                <text:p text:style-name="P2"><text:span text:style-name="T3">رکھتے ہیں جو لوگ چشم بصیرت</text:span><text:span text:style-name="T3"><text:line-break/></text:span><text:span text:style-name="T3">وہ دیکھیں دو بھائیوں کی فضیلت</text:span><text:span text:style-name="T3"><text:line-break/></text:span><text:span text:style-name="T3">معراج کی منزل میں اک ہلکے سے پردے کے</text:span><text:span text:style-name="T3"><text:line-break/></text:span><text:span text:style-name="T3">اِس پار محمد ہیں اُس پار علی مولا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2">
                <text:p text:style-name="P2"><text:span text:style-name="T3">خود جس کو خلاق عالم بڑھائے</text:span><text:span text:style-name="T3"><text:line-break/></text:span><text:span text:style-name="T3">کس میں ہے دم شان اُس کی گھٹائے</text:span><text:span text:style-name="T3"><text:line-break/></text:span><text:span text:style-name="T3">کعبے کا یہ کہنا ہے ایمان کی کعبے کی</text:span><text:span text:style-name="T3"><text:line-break/></text:span><text:span text:style-name="T3">محراب ابو طالب مینار علی مولا</text:span><text:span text:style-name="T4"><text:line-break/></text:span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76.886cm" fo:page-height="109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28:53.760067500</meta:creation-date>
    <dc:date>2026-01-29T11:08:38.088047400</dc:date>
    <meta:editing-duration>PT7M44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