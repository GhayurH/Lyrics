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9.331cm" style:use-optimal-column-width="false"/>
    </style:style>
    <style:style style:name="co2" style:family="table-column">
      <style:table-column-properties style:column-width="62.98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2.313cm" svg:height="104.44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لازم تھی مجھ پہ رد بلا، کیا برا کیا</text:span><text:span text:style-name="T1"><text:line-break/></text:span><text:span text:style-name="T1">نادِ علی سے کام لیا، کیا برا کیا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1">
              <table:table-cell>
                <text:p text:style-name="P1"><text:span text:style-name="T1">جس میں شرابِ عشقِ علی کی رمق نہ تھی</text:span><text:span text:style-name="T1"><text:line-break/></text:span><text:span text:style-name="T1">وہ جام میں نے توڑ دیا، کیا برا کیا</text:span><text:span text:style-name="T2"><text:line-break/></text:span><text:span text:style-name="T2"/></text:p>
              </table:table-cell>
              <table:table-cell>
                <text:p text:style-name="P1"><text:span text:style-name="T1">خالق سے ملتی جلتی ہے تصویر آپ کی</text:span><text:span text:style-name="T1"><text:line-break/></text:span><text:span text:style-name="T1">اس میں نصیریوں نے بھلا، كیا برا کیا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خالق کی بارگاہ میں تاخیر دیکھ کر</text:span><text:span text:style-name="T1"><text:line-break/></text:span><text:span text:style-name="T1">مانگی علی کے در پہ دعا، کیا برا کیا</text:span><text:span text:style-name="T2"><text:line-break/></text:span><text:span text:style-name="T2"/></text:p>
              </table:table-cell>
              <table:table-cell>
                <text:p text:style-name="P1"><text:span text:style-name="T1">جس نے ہلاکتوں سے بچایا تھا شیخ کو</text:span><text:span text:style-name="T1"><text:line-break/></text:span><text:span text:style-name="T1">میں نے اُسی کا نام لیا، کیا برا کیا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بدلو نہ اتحاد کے بستر پہ کروٹیں</text:span><text:span text:style-name="T1"><text:line-break/></text:span><text:span text:style-name="T1">میں نے کہا بُرے کو برا، کیا برا کیا</text:span><text:span text:style-name="T2"><text:line-break/></text:span><text:span text:style-name="T2"/></text:p>
              </table:table-cell>
              <table:table-cell>
                <text:p text:style-name="P1"><text:span text:style-name="T1">جاتا ہے خود طواف کو کعبہ بھی کربلا</text:span><text:span text:style-name="T1"><text:line-break/></text:span><text:span text:style-name="T1">پھر میں نے جا کے کربو بلا، کیا برا کیا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لینی تھی مجھ کو دولت ذکرِ حسین کی</text:span><text:span text:style-name="T1"><text:line-break/></text:span><text:span text:style-name="T1">سر خم علی کے در پہ کیا، کیا برا کیا</text:span><text:span text:style-name="T2"><text:line-break/></text:span><text:span text:style-name="T2"/></text:p>
              </table:table-cell>
              <table:table-cell>
                <text:p text:style-name="P1"><text:span text:style-name="T1">کرنی تھی مجھ کو حضرت عباس کی ثناء</text:span><text:span text:style-name="T1"><text:line-break/></text:span><text:span text:style-name="T1">نامِ علی سے کام لیا، کیا برا کیا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2.309cm" fo:page-height="10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7:48:51.660377300</meta:creation-date>
    <dc:date>2026-01-29T11:07:15.364792400</dc:date>
    <meta:editing-duration>PT2M5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