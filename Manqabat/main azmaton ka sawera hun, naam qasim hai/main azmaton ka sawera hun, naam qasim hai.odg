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8.635cm" style:use-optimal-column-width="false"/>
    </style:style>
    <style:style style:name="co2" style:family="table-column">
      <style:table-column-properties style:column-width="75.485cm" style:use-optimal-column-width="false"/>
    </style:style>
    <style:style style:name="ro1" style:family="table-row">
      <style:table-row-properties style:row-height="68.114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4.119cm" svg:height="204.341cm" svg:x="0cm" svg:y="0cm">
          <table:table table:template-name="black-gray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حیات چھوڑ کے شمشان لو تو بہتر ہے<text:line-break/>حقیقتوں کو ابھی جان لو تو بہتر ہے<text:line-break/>جو کہہ رہا ہوں اُسے مان لو تو بہتر ہے<text:line-break/>میں کون ہوں مجھے پہچان لو تو بہتر ہے<text:line-break/><text:line-break/>شجاعتوں کے صحیفوں کا میں نتیجہ ہوں<text:line-break/>یہی بہت ہے کہ عباسؑ کا بھتیجا ہوں<text:span text:style-name="T1"><text:line-break/></text:span><text:span text:style-name="T1"/></text:p>
              </table:table-cell>
              <table:table-cell>
                <text:p text:style-name="P1">میں عظمتوں کا سویرا ہوں، نام قاسم ہے<text:line-break/>متاعِ فاطمہؑ زہرا ہوں، نام قاسم ہے<text:line-break/>شجاعتوں کی تمنا ہوں، نام قاسم ہے<text:line-break/>قسیمِ خُلد کا پوتا ہوں، نام قاسم ہے<text:line-break/><text:line-break/>کتابِ جنگ میں ترمیم کرنے آیا ہوں<text:line-break/>تمہارے جسموں کو تقسیم کرنے آیا ہوں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وہ داغ دار نسب آئینہ دکھاؤ اُسے<text:line-break/>کہ ہارنے کی خبر تم ذرا سناؤ اُسے<text:line-break/>کہاں ہے شام کا مرحب، بلا کے لاؤ اُسے<text:line-break/>نہ آ رہا ہو تو مقصد مرا بتاؤ اُسے<text:line-break/><text:line-break/>خدا کے شیر کے جوہر دکھانے آیا ہوں<text:line-break/>میں آج پھر درِ خیبر اٹھانے آیا ہوں<text:span text:style-name="T1"><text:line-break/></text:span><text:span text:style-name="T1"/></text:p>
              </table:table-cell>
              <table:table-cell>
                <text:p text:style-name="P1">گالوں کو تیغ کا پانی پلا کے دم لوں گا<text:line-break/>علیؑ کی یاد جہاں کو دِلا کے دم لوں گا<text:line-break/>چراغِ فتحِ حسینیؑ جلا کے دم لوں گا<text:line-break/>ستم گروں کو جہاں سے مٹا کے دم لوں گا<text:line-break/><text:line-break/>بہادری کے لیے نقشۂ کمال ہوں میں<text:line-break/>علیؑ کا نورِ نظر ہوں، حسنؑ کا لعل ہوں میں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جمع کے دشمنِ دیں پہ نظر بڑھے قاسم<text:line-break/>یقین سے پائے فتح و ظفر بڑھے قاسم<text:line-break/>دکھانے تیغِ علیؑ کا ہنر بڑھے قاسم<text:line-break/>جدھر تھا عرَضکِ شامی اُدھر بڑھے قاسم<text:line-break/><text:line-break/>کچھ اس طرح سے لعین کو سپردِ نار کیا<text:line-break/>کہ ایک وار میں دو اور دو کو چار کیا<text:span text:style-name="T1"><text:line-break/></text:span><text:span text:style-name="T1"/></text:p>
              </table:table-cell>
              <table:table-cell>
                <text:p text:style-name="P1">یہ وقت عرصۂ محشر سے جوڑ سکتا ہوں<text:line-break/>حیات و موت کے دھارے کو موڑ سکتا ہوں<text:line-break/>ہر ایک ظلم کے خیبر کو توڑ سکتا ہوں<text:line-break/>بدن سے روح کا پانی نچوڑ سکتا ہوں<text:line-break/><text:line-break/>کتابِ فتح سے ونّاس لکھ کے آیا ہوں<text:line-break/>میں اپنے شانوں پہ عباسؑ لکھ کے آیا ہوں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4.12cm" fo:page-height="204.3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18:57:52.436675100</meta:creation-date>
    <dc:date>2026-01-29T19:01:05.792660300</dc:date>
    <meta:editing-duration>PT3M13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