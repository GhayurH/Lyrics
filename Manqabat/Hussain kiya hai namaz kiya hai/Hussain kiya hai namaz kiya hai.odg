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7.996cm" style:use-optimal-column-width="false"/>
    </style:style>
    <style:style style:name="co2" style:family="table-column">
      <style:table-column-properties style:column-width="47.038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105.801cm" style:use-optimal-row-height="false"/>
    </style:style>
    <style:style style:name="ro3" style:family="table-row">
      <style:table-row-properties style:row-height="96.356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5.033cm" svg:height="319.40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تو اب بھی مجھ سے یہ پوچھتا ہے</text:span><text:span text:style-name="T1"><text:line-break/></text:span><text:span text:style-name="T1">حسین کیا ہے، نماز کیا ہے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1"><text:span text:style-name="T1">نماز کی ابتدا وضو ہے</text:span><text:span text:style-name="T1"><text:line-break/></text:span><text:span text:style-name="T1">تو اس کو پانی سے بے نیازی</text:span><text:span text:style-name="T1"><text:line-break/></text:span><text:span text:style-name="T1"><text:line-break/></text:span><text:span text:style-name="T1">نماز کی انتہا طہارت</text:span><text:span text:style-name="T1"><text:line-break/></text:span><text:span text:style-name="T1">حسین شاہکارِ پاک دامن</text:span><text:span text:style-name="T1"><text:line-break/></text:span><text:span text:style-name="T1"><text:line-break/></text:span><text:span text:style-name="T1">نماز ہے بارہا عبادت</text:span><text:span text:style-name="T1"><text:line-break/></text:span><text:span text:style-name="T1">حسین کا ذکر بے ریاء ہے</text:span><text:span text:style-name="T1"><text:line-break/></text:span><text:span text:style-name="T1"><text:line-break/></text:span><text:span text:style-name="T1">تو اب بھی...</text:span></text:p>
              </table:table-cell>
              <table:table-cell>
                <text:p text:style-name="P1"><text:span text:style-name="T1">حسین پنجتن کا نورِ پنجم</text:span><text:span text:style-name="T1"><text:line-break/></text:span><text:span text:style-name="T1">نماز ہوتی ہے پنجگانہ</text:span><text:span text:style-name="T1"><text:line-break/></text:span><text:span text:style-name="T1"><text:line-break/></text:span><text:span text:style-name="T1">نماز میں عجز و انکساری</text:span><text:span text:style-name="T1"><text:line-break/></text:span><text:span text:style-name="T1">حسین کی شان فاتحانہ</text:span><text:span text:style-name="T1"><text:line-break/></text:span><text:span text:style-name="T1"><text:line-break/></text:span><text:span text:style-name="T1">نماز قبلے کو ڈھونڈتی ہے</text:span><text:span text:style-name="T1"><text:line-break/></text:span><text:span text:style-name="T1">حسین کعبہ بنا رہا ہے</text:span><text:span text:style-name="T1"><text:line-break/></text:span><text:span text:style-name="T1"><text:line-break/></text:span><text:span text:style-name="T1">تو اب بھی...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">نماز ڈرتی رہی لہو سے</text:span><text:span text:style-name="T1"><text:line-break/></text:span><text:span text:style-name="T1">یہ خوں کی مسند بچھا رہا ہے</text:span><text:span text:style-name="T1"><text:line-break/></text:span><text:span text:style-name="T1"><text:line-break/></text:span><text:span text:style-name="T1">نماز زندوں کا ہے وظیفہ</text:span><text:span text:style-name="T1"><text:line-break/></text:span><text:span text:style-name="T1">حسین مرنا سکھا رہا ہے</text:span><text:span text:style-name="T1"><text:line-break/></text:span><text:span text:style-name="T1"><text:line-break/></text:span><text:span text:style-name="T1">نماز ہے کبریا کی طالب</text:span><text:span text:style-name="T1"><text:line-break/></text:span><text:span text:style-name="T1">حسین مطلوبِ کبریا ہے</text:span><text:span text:style-name="T1"><text:line-break/></text:span><text:span text:style-name="T1"><text:line-break/></text:span><text:span text:style-name="T1">تو اب بھی ...</text:span></text:p>
              </table:table-cell>
              <table:table-cell>
                <text:p text:style-name="P1"><text:span text:style-name="T1">نماز ہے روشنی کی طالب</text:span><text:span text:style-name="T1"><text:line-break/></text:span><text:span text:style-name="T1">حسین شمعیں بجھا رہا ہے</text:span><text:span text:style-name="T1"><text:line-break/></text:span><text:span text:style-name="T1"><text:line-break/></text:span><text:span text:style-name="T1">نماز کثرت کو چاہتی ہے</text:span><text:span text:style-name="T1"><text:line-break/></text:span><text:span text:style-name="T1">یہ شانِ وحدت دکھا رہا ہے</text:span><text:span text:style-name="T1"><text:line-break/></text:span><text:span text:style-name="T1"><text:line-break/></text:span><text:span text:style-name="T1">نماز پیچھے ہے مصطفی کے</text:span><text:span text:style-name="T1"><text:line-break/></text:span><text:span text:style-name="T1">یہ دوش پر جگمگا رہا ہے</text:span><text:span text:style-name="T1"><text:line-break/></text:span><text:span text:style-name="T1"><text:line-break/></text:span><text:span text:style-name="T1">تو اب بھی...</text:span></text:p>
              </table:table-cell>
            </table:table-row>
            <table:table-row table:style-name="ro3">
              <table:table-cell table:style-name="ce1" table:number-columns-spanned="2">
                <text:p text:style-name="P1"><text:span text:style-name="T1">نماز زیرِ سجودِ احمدؐ</text:span><text:span text:style-name="T1"><text:line-break/></text:span><text:span text:style-name="T1">حسین کا عزم راکبانہ</text:span><text:span text:style-name="T1"><text:line-break/></text:span><text:span text:style-name="T1"><text:line-break/></text:span><text:span text:style-name="T1">نماز کی شکر انتہا ہے</text:span><text:span text:style-name="T1"><text:line-break/></text:span><text:span text:style-name="T1">تو اس کا مشکور ہے زمانہ</text:span><text:span text:style-name="T1"><text:line-break/></text:span><text:span text:style-name="T1"><text:line-break/></text:span><text:span text:style-name="T1">نماز لوگوں کو ہے بلاتی</text:span><text:span text:style-name="T1"><text:line-break/></text:span><text:span text:style-name="T1">یہ دستِ بیعت اُٹھا رہا ہے</text:span><text:span text:style-name="T1"><text:line-break/></text:span><text:span text:style-name="T1"><text:line-break/></text:span><text:span text:style-name="T1">تو اب بھی...</text:span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95.021cm" fo:page-height="319.4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9T11:10:04.220498700</dc:date>
    <meta:editing-duration>PT1H31M43S</meta:editing-duration>
    <meta:editing-cycles>34</meta:editing-cycles>
    <meta:generator>LibreOffice/25.8.4.2$Windows_X86_64 LibreOffice_project/290daaa01b999472f0c7a3890eb6a550fd74c6df</meta:generator>
    <meta:document-statistic meta:object-count="1"/>
  </office:meta>
</office:document-meta>
</file>